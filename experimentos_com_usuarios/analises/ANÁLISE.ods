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3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4.71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2.043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4.701cm"/>
    </style:style>
    <style:style style:name="co9" style:family="table-column">
      <style:table-column-properties fo:break-before="auto" style:column-width="4.441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4.994cm"/>
    </style:style>
    <style:style style:name="co14" style:family="table-column">
      <style:table-column-properties fo:break-before="auto" style:column-width="5.773cm"/>
    </style:style>
    <style:style style:name="co15" style:family="table-column">
      <style:table-column-properties fo:break-before="auto" style:column-width="5.447cm"/>
    </style:style>
    <style:style style:name="co16" style:family="table-column">
      <style:table-column-properties fo:break-before="auto" style:column-width="6.489cm"/>
    </style:style>
    <style:style style:name="co17" style:family="table-column">
      <style:table-column-properties fo:break-before="auto" style:column-width="6.253cm"/>
    </style:style>
    <style:style style:name="co18" style:family="table-column">
      <style:table-column-properties fo:break-before="auto" style:column-width="12.307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Liberation Mono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2a6099"/>
      <style:text-properties style:font-name="Liberation Mono"/>
    </style:style>
    <style:style style:name="ce23" style:family="table-cell" style:parent-style-name="Default">
      <style:table-cell-properties fo:background-color="#2a6099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  <style:text-properties style:font-name="Liberation Mono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ffa6a6"/>
      <style:text-properties style:font-name="Liberation Mono"/>
    </style:style>
    <style:style style:name="ce27" style:family="table-cell" style:parent-style-name="Default">
      <style:table-cell-properties fo:background-color="#b4c7dc"/>
      <style:text-properties style:font-name="Liberation Mono"/>
    </style:style>
    <style:style style:name="ce28" style:family="table-cell" style:parent-style-name="Default" style:data-style-name="N61">
      <style:table-cell-properties fo:background-color="#ff0000"/>
      <style:text-properties style:font-name="Liberation Mono"/>
    </style:style>
    <style:style style:name="ce29" style:family="table-cell" style:parent-style-name="Default">
      <style:table-cell-properties fo:background-color="#ff6d6d"/>
      <style:text-properties style:font-name="Liberation Mono"/>
    </style:style>
    <style:style style:name="ce30" style:family="table-cell" style:parent-style-name="Default">
      <style:table-cell-properties fo:background-color="#ffd7d7"/>
      <style:text-properties style:font-name="Liberation Mono"/>
    </style:style>
    <style:style style:name="ce31" style:family="table-cell" style:parent-style-name="Default">
      <style:table-cell-properties fo:background-color="#ffd7d7"/>
    </style:style>
    <style:style style:name="ce32" style:family="table-cell" style:parent-style-name="Default">
      <style:table-cell-properties fo:background-color="#2a60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6369" table:default-cell-style-name="Default"/>
        <table:table-row table:style-name="ro1"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Tarefa</text:p>
          </table:table-cell>
          <table:table-cell table:style-name="ce5" office:value-type="string" calcext:value-type="string">
            <text:p>Quantidade </text:p>
            <text:p>de vezes</text:p>
            <text:p>Que solicitou </text:p>
            <text:p>Ajuda do</text:p>
            <text:p>Assistente</text:p>
          </table:table-cell>
          <table:table-cell table:number-columns-repeated="2" table:style-name="ce1" office:value-type="string" calcext:value-type="string">
            <text:p>Total Tentativas (Teclado + Voz)</text:p>
          </table:table-cell>
          <table:table-cell table:style-name="ce1" office:value-type="string" calcext:value-type="string">
            <text:p>Erro Sistema (Não ouviu ou gerou errado)</text:p>
          </table:table-cell>
          <table:table-cell table:style-name="ce1" office:value-type="string" calcext:value-type="string">
            <text:p>Erro Usuário (Lógica)</text:p>
          </table:table-cell>
          <table:table-cell table:style-name="ce1" office:value-type="string" calcext:value-type="string">
            <text:p>Erro Navegação</text:p>
          </table:table-cell>
          <table:table-cell table:style-name="ce1" office:value-type="string" calcext:value-type="string">
            <text:p>Taxa Falha Sistema (%)</text:p>
          </table:table-cell>
          <table:table-cell table:style-name="ce1" office:value-type="string" calcext:value-type="string">
            <text:p>Taxa Erro Usuário (%)</text:p>
          </table:table-cell>
          <table:table-cell table:style-name="ce5" office:value-type="string" calcext:value-type="string">
            <text:p>Tempo da </text:p>
            <text:p>Tarefa</text:p>
          </table:table-cell>
          <table:table-cell table:style-name="ce5" office:value-type="string" calcext:value-type="string">
            <text:p>Desistiu?</text:p>
          </table:table-cell>
          <table:table-cell table:style-name="ce9" office:value-type="string" calcext:value-type="string">
            <text:p>Quantidade de Vezes</text:p>
            <text:p>Que pediu para </text:p>
            <text:p>Repetir um comando?</text:p>
          </table:table-cell>
          <table:table-cell table:style-name="ce9" office:value-type="string" calcext:value-type="string">
            <text:p>Quantidade</text:p>
            <text:p>De vezes que</text:p>
            <text:p>Pediu ajuda?</text:p>
          </table:table-cell>
          <table:table-cell table:style-name="ce9" office:value-type="string" calcext:value-type="string">
            <text:p>Tipo de ajuda?</text:p>
            <text:p>(escreva e separe </text:p>
            <text:p>Por virgulas)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01</text:p>
          </table:table-cell>
          <table:table-cell table:style-name="ce4" office:value-type="string" calcext:value-type="string">
            <text:p>T1</text:p>
          </table:table-cell>
          <table:table-cell table:style-name="ce11" office:value-type="string" calcext:value-type="string">
            <text:p>8 (log)</text:p>
          </table:table-cell>
          <table:table-cell table:style-name="ce4" office:value-type="string" calcext:value-type="string">
            <text:p>40 (log) + 11 (voz)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F2]/[.E2]*100" office:value-type="float" office:value="3.92156862745098" calcext:value-type="float">
            <text:p>3,92156862745098</text:p>
          </table:table-cell>
          <table:table-cell table:style-name="ce17" table:formula="of:=([.G2]+[.H2])/[.E2]*100" office:value-type="float" office:value="21.5686274509804" calcext:value-type="float">
            <text:p>21,5686274509804</text:p>
          </table:table-cell>
          <table:table-cell table:style-name="ce24" office:value-type="string" calcext:value-type="string">
            <text:p>2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Não estava localizando a tecla enter, não sabia como ver o que escrevia no código, auxiliar a usar a ajuda F1, não sabia se o microfone estava habilitado, a participante não sabia o que viria depois de falar “Ajuda 1”, Apresentou dúvidas sobre o conceito de programação “escrever”, Não sabia o próximo passo (executar), Novamente apresentou dúvidas sobre o conceito de programação “escrever”, Não sabia o que era “executar”,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2</text:p>
          </table:table-cell>
          <table:table-cell table:style-name="ce4" office:value-type="string" calcext:value-type="string">
            <text:p>T1</text:p>
          </table:table-cell>
          <table:table-cell table:style-name="ce11" office:value-type="string" calcext:value-type="string">
            <text:p>10 (log)</text:p>
          </table:table-cell>
          <table:table-cell table:style-name="ce4" office:value-type="string" calcext:value-type="string">
            <text:p>60 (log) + 7 (voz)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3]/[.E3]*100" office:value-type="float" office:value="4.47761194029851" calcext:value-type="float">
            <text:p>4,47761194029851</text:p>
          </table:table-cell>
          <table:table-cell table:style-name="ce18" table:formula="of:=([.G3]+[.H3])/[.E3]*100" office:value-type="float" office:value="4.47761194029851" calcext:value-type="float">
            <text:p>4,47761194029851</text:p>
          </table:table-cell>
          <table:table-cell table:style-name="ce25" office:value-type="string" calcext:value-type="string">
            <text:p>2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Ela precisou que repetisse os atalhos da tela inicial de boas-vindas; A participante havia esquecido o atalho para imprimir na tela, mas logo foi orientado a usar a tecla F1; Ela confundiu “imprimir na tela” com “executar”, pois a execução fala que ela declarou uma variável e o seu valor; <text:s/>A participante ficou na dúvida se quando o assistente cancelava a operação ela teria que fazer tudo de novo; A participante apresentou dúvidas sobre o conceito de “impressão de valores”, que foi devidamente explicado; Ela ficou na dúvida se a impressão de valores era pra ‘variável’ ou ‘texto livre’; A participante apresentou dúvidas quanto a correção de erros no código, que deve ser feita direto no editor; Apresentou dúvidas quanto ao ajuste fino solicitado pelo interpretador da linguagem Égua;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3</text:p>
          </table:table-cell>
          <table:table-cell table:style-name="ce4" office:value-type="string" calcext:value-type="string">
            <text:p>T1</text:p>
          </table:table-cell>
          <table:table-cell table:style-name="ce11" office:value-type="string" calcext:value-type="string">
            <text:p>1 (log)</text:p>
          </table:table-cell>
          <table:table-cell table:style-name="ce16" office:value-type="string" calcext:value-type="string">
            <text:p>312 (log) + 20 (voz)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[.F4]/[.E4]*100" office:value-type="float" office:value="2.71084337349398" calcext:value-type="float">
            <text:p>2,71084337349398</text:p>
          </table:table-cell>
          <table:table-cell table:style-name="ce19" table:formula="of:=([.G4]+[.H4])/[.E4]*100" office:value-type="float" office:value="2.10843373493976" calcext:value-type="float">
            <text:p>2,10843373493976</text:p>
          </table:table-cell>
          <table:table-cell table:style-name="ce24" office:value-type="string" calcext:value-type="string">
            <text:p>2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O usuário queria saber como desfazia a alteração no editor de código, pois o sistema havia criado a variável de forma errônea; O usuário queria entender porque o sistema estava apenas falando a tecla pressionada, mas sem localização no editor (faltou CTRL+H);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4</text:p>
          </table:table-cell>
          <table:table-cell table:style-name="ce10" office:value-type="string" calcext:value-type="string">
            <text:p>T1</text:p>
          </table:table-cell>
          <table:table-cell table:style-name="ce11" office:value-type="string" calcext:value-type="string">
            <text:p>6 (log)</text:p>
          </table:table-cell>
          <table:table-cell table:style-name="ce4" office:value-type="string" calcext:value-type="string">
            <text:p>31 (log) + 2 (voz)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table:formula="of:=[.F5]/[.E5]*100" office:value-type="float" office:value="12.1212121212121" calcext:value-type="float">
            <text:p>12,1212121212121</text:p>
          </table:table-cell>
          <table:table-cell table:style-name="ce20" table:formula="of:=([.G5]+[.H5])/[.E5]*100" office:value-type="float" office:value="9.09090909090909" calcext:value-type="float">
            <text:p>9,09090909090909</text:p>
          </table:table-cell>
          <table:table-cell table:style-name="ce26" office:value-type="string" calcext:value-type="string">
            <text:p>16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O usuário queria que repetisse a listagem inicial, sendo que só pode ir agora a partir das teclas F1 ou CTRL+H; O usuário perguntou qual seria a próxima ação (que no caso, seria o F2) e que deveria ter um tutorial inicial explicando onde acessar os comandos; O usuário queria saber se o sistema aceitava apenas comandos de voz, mas também aceita comandos via teclado; Por conta do reconhecimento incorreto da voz do usuário nas opções do assistente F5, o usuário percebe que talvez isso pode ser um bloqueio do assistente para que não use essa opção, o que não é verdade;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5</text:p>
          </table:table-cell>
          <table:table-cell table:style-name="ce10" office:value-type="string" calcext:value-type="string">
            <text:p>T1</text:p>
          </table:table-cell>
          <table:table-cell table:style-name="ce11" office:value-type="string" calcext:value-type="string">
            <text:p>7 (log)</text:p>
          </table:table-cell>
          <table:table-cell table:style-name="ce4" office:value-type="string" calcext:value-type="string">
            <text:p>13 (log) + 8(voz)</text:p>
          </table:table-cell>
          <table:table-cell table:style-name="ce4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4" table:formula="of:=[.F6]/[.E6]*100" office:value-type="float" office:value="14.2857142857143" calcext:value-type="float">
            <text:p>14,2857142857143</text:p>
          </table:table-cell>
          <table:table-cell table:style-name="ce21" table:formula="of:=([.G6]+[.H6])/[.E6]*100" office:value-type="float" office:value="14.2857142857143" calcext:value-type="float">
            <text:p>14,2857142857143</text:p>
          </table:table-cell>
          <table:table-cell table:style-name="ce24" office:value-type="string" calcext:value-type="string">
            <text:p>2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Queria saber como repetir as instruções iniciais (não era possível, logo solicitei o uso de F1 ou CTRL+H); O usuário não sabia dar o próximo passo e pediu ajuda, mas não sabia como pedir ajuda; Novamente, o usuário queria saber como dar o próximo comando (criar variável); O usuário perguntou se era através do microfone que solicitava as operações (sim); O usuário queria saber como voltava para os assistentes; O usuário apresentou confusão na lista de atalhos CTRL+H; Queria saber qual o comando pra imprimir valor na tela e se ele ia precisar fazer tudo do começo; Perguntou se precisaria usar o assistente de voz novamente; O usuário não entendeu quando o assistente cancelou a operação por ele ter falado algo que não era uma das opções e que preciava repetir o comando; O usuário perguntou se a opção realmente era “variável”, pois o assistente não havia entendido; O usuário ficou na dúvida porque que a voz masculina de captura de fala não havia se repetido, por motivos de cancelamento da tarefa; </text:p>
          </table:table-cell>
          <table:table-cell table:style-name="ce11" table:number-columns-repeated="16369"/>
        </table:table-row>
        <table:table-row table:style-name="ro2">
          <table:table-cell table:style-name="ce10" office:value-type="string" calcext:value-type="string">
            <text:p>P06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8 (log)</text:p>
          </table:table-cell>
          <table:table-cell table:style-name="ce10" office:value-type="string" calcext:value-type="string">
            <text:p>29 (log) + 6 (voz)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F7]/[.E7]*100" office:value-type="float" office:value="5.71428571428571" calcext:value-type="float">
            <text:p>5,71428571428571</text:p>
          </table:table-cell>
          <table:table-cell table:style-name="ce22" table:formula="of:=([.G7]+[.H7])/[.E7]*100" office:value-type="float" office:value="0" calcext:value-type="float">
            <text:p>0</text:p>
          </table:table-cell>
          <table:table-cell table:style-name="ce27" office:value-type="string" calcext:value-type="string">
            <text:p>1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O usuário perguntou onde alterava a velocidade da voz (alt + setas); O usuário perguntou se a navegação na ajuda funcionava semelhante ao NVDA (por setas); Nas teclas F2, F3 e F4 (assistentes), o usuário perguntou se ia precisar aprender sozinho ou ia ter um tutorial (sozinho); O usuário ficou na dúvida se o assistente iria avisá-lo se o áudio do microfone estava sendo capturado (bip/som: sim!)</text:p>
          </table:table-cell>
          <table:table-cell table:style-name="ce10" table:number-columns-repeated="16369"/>
        </table:table-row>
        <table:table-row table:style-name="ro2">
          <table:table-cell table:style-name="ce11" table:number-columns-repeated="16384"/>
        </table:table-row>
        <table:table-row table:style-name="ro2">
          <table:table-cell office:value-type="string" calcext:value-type="string">
            <text:p>P01</text:p>
          </table:table-cell>
          <table:table-cell table:style-name="ce10" office:value-type="string" calcext:value-type="string">
            <text:p>T2</text:p>
          </table:table-cell>
          <table:table-cell table:style-name="ce11" office:value-type="string" calcext:value-type="string">
            <text:p>14 (log) + 4 (assist)</text:p>
          </table:table-cell>
          <table:table-cell table:style-name="ce4" office:value-type="string" calcext:value-type="string">
            <text:p>55 (log) + 44 (voz)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4" table:formula="of:=[.F9]/[.E9]*100" office:value-type="float" office:value="14.1414141414141" calcext:value-type="float">
            <text:p>14,1414141414141</text:p>
          </table:table-cell>
          <table:table-cell table:style-name="ce20" table:formula="of:=([.G9]+[.H9])/[.E9]*100" office:value-type="float" office:value="17.1717171717172" calcext:value-type="float">
            <text:p>17,1717171717172</text:p>
          </table:table-cell>
          <table:table-cell table:style-name="ce28" office:value-type="string" calcext:value-type="string">
            <text:p>3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e o assistente para criar variáveis cria duas ou mais variáveis ou só uma de cada vez, Pediu ajuda para relembrar o fluxo de operação, Não sabia como funcionava o assistente para criação de operações, Não sabia o próximo passo (fluxo) para criar a próxima operação à variável y,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2</text:p>
          </table:table-cell>
          <table:table-cell table:style-name="ce10" office:value-type="string" calcext:value-type="string">
            <text:p>T2</text:p>
          </table:table-cell>
          <table:table-cell table:style-name="ce11" office:value-type="string" calcext:value-type="string">
            <text:p>9 (log)</text:p>
          </table:table-cell>
          <table:table-cell table:style-name="ce4" office:value-type="string" calcext:value-type="string">
            <text:p>139 (log) + 27 (voz)</text:p>
          </table:table-cell>
          <table:table-cell table:style-name="ce4" office:value-type="float" office:value="166" calcext:value-type="float">
            <text:p>16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4" table:formula="of:=[.F10]/[.E10]*100" office:value-type="float" office:value="5.42168674698795" calcext:value-type="float">
            <text:p>5,42168674698795</text:p>
          </table:table-cell>
          <table:table-cell table:style-name="ce19" table:formula="of:=([.G10]+[.H10])/[.E10]*100" office:value-type="float" office:value="4.21686746987952" calcext:value-type="float">
            <text:p>4,21686746987952</text:p>
          </table:table-cell>
          <table:table-cell table:style-name="ce29" office:value-type="string" calcext:value-type="string">
            <text:p>27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 participante ficou na dúvida se o assistente para criação de variáveis cria uma variável ou várias variáveis por vez; A usuária queria saber como acessar os atalhos de navegação do código; A participante não sabia como ler a linha no código; A participante esperava que desse para falar o comando após o assistente cancelar a operação; A participante não sabia se ela colocava a expressão 4*5 ou o resultado 20 atribuído na variável;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3</text:p>
          </table:table-cell>
          <table:table-cell table:style-name="ce10" office:value-type="string" calcext:value-type="string">
            <text:p>T2</text:p>
          </table:table-cell>
          <table:table-cell table:style-name="ce11" office:value-type="string" calcext:value-type="string">
            <text:p>1 (log)</text:p>
          </table:table-cell>
          <table:table-cell table:style-name="ce4" office:value-type="string" calcext:value-type="string">
            <text:p>261 (log) + 4(voz)</text:p>
          </table:table-cell>
          <table:table-cell table:style-name="ce4" office:value-type="float" office:value="265" calcext:value-type="float">
            <text:p>26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4" table:formula="of:=[.F11]/[.E11]*100" office:value-type="float" office:value="0.377358490566038" calcext:value-type="float">
            <text:p>0,377358490566038</text:p>
          </table:table-cell>
          <table:table-cell table:style-name="ce23" table:formula="of:=([.G11]+[.H11])/[.E11]*100" office:value-type="float" office:value="0.754716981132076" calcext:value-type="float">
            <text:p>0,754716981132076</text:p>
          </table:table-cell>
          <table:table-cell table:style-name="ce22" office:value-type="string" calcext:value-type="string">
            <text:p>7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1" table:number-columns-repeated="16369"/>
        </table:table-row>
        <table:table-row table:style-name="ro2">
          <table:table-cell office:value-type="string" calcext:value-type="string">
            <text:p>P04</text:p>
          </table:table-cell>
          <table:table-cell table:style-name="ce10" office:value-type="string" calcext:value-type="string">
            <text:p>T2</text:p>
          </table:table-cell>
          <table:table-cell table:style-name="ce11" office:value-type="string" calcext:value-type="string">
            <text:p>9 (log)</text:p>
          </table:table-cell>
          <table:table-cell table:style-name="ce4" office:value-type="string" calcext:value-type="string">
            <text:p>29 (log) + 15 (voz)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4" table:formula="of:=[.F12]/[.E12]*100" office:value-type="float" office:value="9.09090909090909" calcext:value-type="float">
            <text:p>9,09090909090909</text:p>
          </table:table-cell>
          <table:table-cell table:style-name="ce21" table:formula="of:=([.G12]+[.H12])/[.E12]*100" office:value-type="float" office:value="27.2727272727273" calcext:value-type="float">
            <text:p>27,2727272727273</text:p>
          </table:table-cell>
          <table:table-cell table:style-name="ce26" office:value-type="string" calcext:value-type="string">
            <text:p>2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O usuário ficou com dúvidas sobre o que saiu do assistente; O usuário ficou na dúvida se a variável y precisava ter um valor (sim, uma expressão: 4*5); Como corrigir o que foi adicionado errado no código; Novamente, o usuário pergunta se há uma função para corrigir erros no código; O usuário perguntou onde executa o código;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5</text:p>
          </table:table-cell>
          <table:table-cell table:style-name="ce10" office:value-type="string" calcext:value-type="string">
            <text:p>T2</text:p>
          </table:table-cell>
          <table:table-cell table:style-name="ce11" office:value-type="string" calcext:value-type="string">
            <text:p>2 (log)</text:p>
          </table:table-cell>
          <table:table-cell table:style-name="ce4" office:value-type="string" calcext:value-type="string">
            <text:p>12 (log) + 15(voz)</text:p>
          </table:table-cell>
          <table:table-cell table:style-name="ce4" office:value-type="float" office:value="27" calcext:value-type="float">
            <text:p>2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4" table:formula="of:=[.F13]/[.E13]*100" office:value-type="float" office:value="22.2222222222222" calcext:value-type="float">
            <text:p>22,2222222222222</text:p>
          </table:table-cell>
          <table:table-cell table:style-name="ce17" table:formula="of:=([.G13]+[.H13])/[.E13]*100" office:value-type="float" office:value="40.7407407407407" calcext:value-type="float">
            <text:p>40,7407407407407</text:p>
          </table:table-cell>
          <table:table-cell table:style-name="ce30" office:value-type="string" calcext:value-type="string">
            <text:p>19:30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icou na dúvida em relação a atribuição de operações para as variáveis y e z; Ficou na dúvida sobre a quantidade de variáveis que podiam ser criadas no comando F2; Pediu para repetir as orientações anteriores, pois havia ficado confuso; Queria saber onde procurava a lista de assistentes (F1); Ficou na dúvida sobre qual seria o próximo passo dentro do fluxo de execuções no programa; Ficou na dúvida se, quando o assistente cancelava, ele tinha que repetir a operação; Ficou na dúvida sobre o sistema de abortar assistente usando o CTRL+ESC; Apresentou dúvidas na manipulação de Operações matemáticas; Não lembrava o comando para voltar a uma operação anterior; Ficou na dúvida porque o sistema gerou o código quando ficou em silêncio; Não sabia que precisava ter abortado o assistente em caso de dúvidas; Queria saber se precisava repetir os comandos; Não entendeu porque que as variáveis y e z são numéricas; Não sabia a diferença entre tipos “numérico” e “texto”; Dúvida no fluxo de operação; Se para o próximo passo precisava dar o mesmo comando do anterior (sim);</text:p>
          </table:table-cell>
          <table:table-cell table:style-name="ce11" table:number-columns-repeated="16369"/>
        </table:table-row>
        <table:table-row table:style-name="ro2">
          <table:table-cell table:style-name="ce10" office:value-type="string" calcext:value-type="string">
            <text:p>P06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3 (log)</text:p>
          </table:table-cell>
          <table:table-cell table:style-name="ce10" office:value-type="string" calcext:value-type="string">
            <text:p>40 (log) + 16 (voz)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4" table:formula="of:=[.F14]/[.E14]*100" office:value-type="float" office:value="5.35714285714286" calcext:value-type="float">
            <text:p>5,35714285714286</text:p>
          </table:table-cell>
          <table:table-cell table:style-name="ce18" table:formula="of:=([.G14]+[.H14])/[.E14]*100" office:value-type="float" office:value="7.14285714285714" calcext:value-type="float">
            <text:p>7,14285714285714</text:p>
          </table:table-cell>
          <table:table-cell table:style-name="ce27" office:value-type="string" calcext:value-type="string">
            <text:p>15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O assistente terminou a captura de fala muito rapidamente e o usuário ficou na dúvida sobre se estava correto o código gerado. Pedi para que ele consultasse o CTRL+H; O usuário ficou na dúvida sobre o funcionamento do assistente F3 (criar operações), como era criado, se permitia operações entre variáveis, e se diferenciava do F2 (criar variável); O usuário ficou confuso com a saída inesperada do modelo de geração; O usuário perguntou sobre o comando para apagar código (F10)</text:p>
          </table:table-cell>
          <table:table-cell table:style-name="ce10" table:number-columns-repeated="16369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office:value-type="string" calcext:value-type="string">
            <text:p>P01</text:p>
          </table:table-cell>
          <table:table-cell table:style-name="ce10" office:value-type="string" calcext:value-type="string">
            <text:p>T3</text:p>
          </table:table-cell>
          <table:table-cell table:style-name="ce11" office:value-type="string" calcext:value-type="string">
            <text:p>8 (log)</text:p>
          </table:table-cell>
          <table:table-cell table:style-name="ce4" office:value-type="string" calcext:value-type="string">
            <text:p>179 (log) + 30 (voz)</text:p>
          </table:table-cell>
          <table:table-cell table:style-name="ce4" office:value-type="float" office:value="209" calcext:value-type="float">
            <text:p>20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4" table:formula="of:=[.F16]/[.E16]*100" office:value-type="float" office:value="5.26315789473684" calcext:value-type="float">
            <text:p>5,26315789473684</text:p>
          </table:table-cell>
          <table:table-cell table:style-name="ce18" table:formula="of:=([.G16]+[.H16])/[.E16]*100" office:value-type="float" office:value="4.30622009569378" calcext:value-type="float">
            <text:p>4,30622009569378</text:p>
          </table:table-cell>
          <table:table-cell table:style-name="ce26" office:value-type="string" calcext:value-type="string">
            <text:p>31 min</text:p>
          </table:table-cell>
          <table:table-cell table:style-name="ce24" office:value-type="string" calcext:value-type="string">
            <text:p>Si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Ela perguntou se após a criação da variável já era pra criar a estrutura condicional (sim), Dúvidas na criação de condicional, Ela perguntou como ir direto ao bloco de condicional, Dúvida se pontuação se coloca com voz também (não)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2</text:p>
          </table:table-cell>
          <table:table-cell table:style-name="ce10" office:value-type="string" calcext:value-type="string">
            <text:p>T3</text:p>
          </table:table-cell>
          <table:table-cell table:style-name="ce11" office:value-type="string" calcext:value-type="string">
            <text:p>2 (log)</text:p>
          </table:table-cell>
          <table:table-cell table:style-name="ce4" office:value-type="string" calcext:value-type="string">
            <text:p>104 (log) + 35 (voz)</text:p>
          </table:table-cell>
          <table:table-cell table:style-name="ce4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4" table:formula="of:=[.F17]/[.E17]*100" office:value-type="float" office:value="7.19424460431655" calcext:value-type="float">
            <text:p>7,19424460431655</text:p>
          </table:table-cell>
          <table:table-cell table:style-name="ce21" table:formula="of:=([.G17]+[.H17])/[.E17]*100" office:value-type="float" office:value="20.1438848920863" calcext:value-type="float">
            <text:p>20,1438848920863</text:p>
          </table:table-cell>
          <table:table-cell table:style-name="ce27" office:value-type="string" calcext:value-type="string">
            <text:p>28 min</text:p>
          </table:table-cell>
          <table:table-cell table:style-name="ce24" office:value-type="string" calcext:value-type="string">
            <text:p>Sim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 usuária ficou na dúvida se o primeiro assistente também cria estruturas condicionais; A participante perguntou se a solução poderiam ter dois “SE’s” (sim, e não havia pensado nessa possibilidade no gabarito); A usuária questionou porque o assistente havia criado errado a numeração 25, colocando no lugar 75 (erro de reconhecimento de fala);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3</text:p>
          </table:table-cell>
          <table:table-cell table:style-name="ce10" office:value-type="string" calcext:value-type="string">
            <text:p>T3</text:p>
          </table:table-cell>
          <table:table-cell table:style-name="ce11" office:value-type="string" calcext:value-type="string">
            <text:p>0 (log)</text:p>
          </table:table-cell>
          <table:table-cell table:style-name="ce4" office:value-type="string" calcext:value-type="string">
            <text:p>1238 (log) + 3(voz)</text:p>
          </table:table-cell>
          <table:table-cell table:style-name="ce4" office:value-type="float" office:value="1241" calcext:value-type="float">
            <text:p>124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" table:formula="of:=[.F18]/[.E18]*100" office:value-type="float" office:value="0.16116035455278" calcext:value-type="float">
            <text:p>0,16116035455278</text:p>
          </table:table-cell>
          <table:table-cell table:style-name="ce23" table:formula="of:=([.G18]+[.H18])/[.E18]*100" office:value-type="float" office:value="0" calcext:value-type="float">
            <text:p>0</text:p>
          </table:table-cell>
          <table:table-cell table:style-name="ce29" office:value-type="string" calcext:value-type="string">
            <text:p>35 min</text:p>
          </table:table-cell>
          <table:table-cell table:style-name="ce22" office:value-type="string" calcext:value-type="string">
            <text:p>N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1" table:number-columns-repeated="16369"/>
        </table:table-row>
        <table:table-row table:style-name="ro2">
          <table:table-cell office:value-type="string" calcext:value-type="string">
            <text:p>P04</text:p>
          </table:table-cell>
          <table:table-cell table:style-name="ce10" office:value-type="string" calcext:value-type="string">
            <text:p>T3</text:p>
          </table:table-cell>
          <table:table-cell table:style-name="ce11" office:value-type="string" calcext:value-type="string">
            <text:p>10 (log)</text:p>
          </table:table-cell>
          <table:table-cell table:style-name="ce4" office:value-type="string" calcext:value-type="string">
            <text:p>100 (log) + 22 (voz)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4" table:formula="of:=[.F19]/[.E19]*100" office:value-type="float" office:value="6.55737704918033" calcext:value-type="float">
            <text:p>6,55737704918033</text:p>
          </table:table-cell>
          <table:table-cell table:style-name="ce20" table:formula="of:=([.G19]+[.H19])/[.E19]*100" office:value-type="float" office:value="16.3934426229508" calcext:value-type="float">
            <text:p>16,3934426229508</text:p>
          </table:table-cell>
          <table:table-cell table:style-name="ce24" office:value-type="string" calcext:value-type="string">
            <text:p>40 min</text:p>
          </table:table-cell>
          <table:table-cell table:style-name="ce22" office:value-type="string" calcext:value-type="string">
            <text:p>Não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 usuário estava na dúvida se o comando para criar estruturas condicionais realmente era o F4; O usuário queria saber a diferença entre a variável simples e a booleana; O usuário estava com dúvida se, após a execução do código, ele teria que continuar ajeitando os erros ou finalizar; Ele questionou se precisava refazer tudo de novo ou por partes; O usuário ficou na dúvida sobre a localização das teclas no editor de código; O usuário ficou na dúvida de como realizar ajustes finos no código (necessário conhecimento de programação); Após cometer um erro de navegação e inserir um caracter no editor de código, o usuário não sabia como corrigir ou remover o caracter do código; O usuário estava com dúvida no comando F10 (limpar toda área de código) se limpava só uma linha ou tudo; O usuário perguntou se tinha como apagar só uma linha; O usuário questinou se, após o console dar uma sugestão de código, se seria possível copiar essa sugestão; O usuário fez o questionamento sobre o “assistente para dar comandos personalizados para inserir código”, </text:p>
          </table:table-cell>
          <table:table-cell table:style-name="ce11" table:number-columns-repeated="16369"/>
        </table:table-row>
        <table:table-row table:style-name="ro2">
          <table:table-cell office:value-type="string" calcext:value-type="string">
            <text:p>P05</text:p>
          </table:table-cell>
          <table:table-cell table:style-name="ce10" office:value-type="string" calcext:value-type="string">
            <text:p>T3</text:p>
          </table:table-cell>
          <table:table-cell table:style-name="ce11" office:value-type="string" calcext:value-type="string">
            <text:p>2 (log)</text:p>
          </table:table-cell>
          <table:table-cell table:style-name="ce4" office:value-type="string" calcext:value-type="string">
            <text:p>15 (log) + 16(voz)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4" table:formula="of:=[.F20]/[.E20]*100" office:value-type="float" office:value="35.4838709677419" calcext:value-type="float">
            <text:p>35,4838709677419</text:p>
          </table:table-cell>
          <table:table-cell table:style-name="ce17" table:formula="of:=([.G20]+[.H20])/[.E20]*100" office:value-type="float" office:value="32.258064516129" calcext:value-type="float">
            <text:p>32,258064516129</text:p>
          </table:table-cell>
          <table:table-cell table:style-name="ce22" office:value-type="string" calcext:value-type="string">
            <text:p>20 min</text:p>
          </table:table-cell>
          <table:table-cell table:style-name="ce24" office:value-type="string" calcext:value-type="string">
            <text:p>Sim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Dúvidas na construção de estrutura condicional (como funciona o SE-ENTÃO-SENÃO); Por causa da criação da estrutura condicional após cancelamento da operação do usuário, ele ficou com dúvidas sobre o que o assistente criou; Ele não tinha certeza se o comando da estrutura condicional era F4; Novamente, o usuário apresentou dúvidas quanto ao seguimento do fluxo de criação após cancelamento da operação no assistente; Novamente, o usuário possuía dúvidas quanto ao prosseguimento no fluxo de execução; Após o usuário apertar um comando de forma equivocada, ele não sabia como voltar; O usuário não sabia o que fazer no bloco SENÃO; Após não realizar a estrutura condicional e ter cometido um erro, o usuário não sabia como voltar; O usuário, novamente, não lembrava do comando de criação de condicionais (F4); Pelo fato do usuário não ter entendido tão bem a estrutura condicional, ele não estava sabendo onde corrigir o código; Por causa do erro do assistente em criar a estrutura condicional SENÃO, o usuário estava se sentindo confuso; </text:p>
          </table:table-cell>
          <table:table-cell table:style-name="ce11" table:number-columns-repeated="16369"/>
        </table:table-row>
        <table:table-row table:style-name="ro2">
          <table:table-cell table:style-name="ce11" office:value-type="string" calcext:value-type="string">
            <text:p>P06</text:p>
          </table:table-cell>
          <table:table-cell table:style-name="ce11" office:value-type="string" calcext:value-type="string">
            <text:p>T3</text:p>
          </table:table-cell>
          <table:table-cell table:style-name="ce11" office:value-type="string" calcext:value-type="string">
            <text:p>3 (log)</text:p>
          </table:table-cell>
          <table:table-cell table:style-name="ce11" office:value-type="string" calcext:value-type="string">
            <text:p>552 (log) + 36 (voz)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4" table:formula="of:=[.F21]/[.E21]*100" office:value-type="float" office:value="2.04081632653061" calcext:value-type="float">
            <text:p>2,04081632653061</text:p>
          </table:table-cell>
          <table:table-cell table:style-name="ce19" table:formula="of:=([.G21]+[.H21])/[.E21]*100" office:value-type="float" office:value="1.02040816326531" calcext:value-type="float">
            <text:p>1,02040816326531</text:p>
          </table:table-cell>
          <table:table-cell table:style-name="ce31" office:value-type="string" calcext:value-type="string">
            <text:p>30 min</text:p>
          </table:table-cell>
          <table:table-cell table:style-name="ce32" office:value-type="string" calcext:value-type="string">
            <text:p>Nã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O usuário perguntou sobre como o assistente havia escrito a variável t (te) e se havia algum problema (no futuro, talvez sim); O usuário perguntou como apagava um trecho do código (navegação Shift + setas e Backspace); Como o usuário poderia criar apenas um pedaço da condicional (SENÃO: teria que usar CTRL+K ou F9); O assistente não entendeu o comando do usuário, e o assistente cancelou, porém o usuário ficou confuso quando o assistente finalizou devido ao erro de reconhecimento de voz; O sistema não reconheceu 2 vezes o comando “variável simples” no primeiro assistente.</text:p>
          </table:table-cell>
          <table:table-cell table:style-name="ce11" table:number-columns-repeated="16369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table:style-name="ce14"/>
          <table:table-cell table:number-columns-repeated="4"/>
          <table:table-cell office:value-type="string" calcext:value-type="string">
            <text:p>Obs: É possível conferir a quantidade de erros através dos logs do teclado e das transcrições das gravações</text:p>
          </table:table-cell>
          <table:table-cell table:number-columns-repeated="16378"/>
        </table:table-row>
        <table:table-row table:style-name="ro2" table:number-rows-repeated="5">
          <table:table-cell table:style-name="ce14"/>
          <table:table-cell table:number-columns-repeated="16383"/>
        </table:table-row>
        <table:table-row table:style-name="ro2" table:number-rows-repeated="10">
          <table:table-cell table:style-name="Default"/>
          <table:table-cell table:number-columns-repeated="16383"/>
        </table:table-row>
        <table:table-row table:style-name="ro2">
          <table:table-cell table:style-name="Default"/>
          <table:table-cell table:number-columns-repeated="8"/>
          <table:table-cell office:value-type="string" calcext:value-type="string">
            <text:p>,,</text:p>
          </table:table-cell>
          <table:table-cell table:number-columns-repeated="16374"/>
        </table:table-row>
      </table:table>
      <table:table table:name="Planilha2" table:style-name="ta1">
        <table:table-column table:style-name="co1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4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Tarefa</text:p>
          </table:table-cell>
          <table:table-cell table:style-name="ce5" office:value-type="string" calcext:value-type="string">
            <text:p>Quantidade </text:p>
            <text:p>de vezes</text:p>
            <text:p>Que solicitou </text:p>
            <text:p>Ajuda do</text:p>
            <text:p>Assistente</text:p>
          </table:table-cell>
          <table:table-cell table:number-columns-repeated="2" table:style-name="ce1" office:value-type="string" calcext:value-type="string">
            <text:p>Total Tentativas (Teclado + Voz)</text:p>
          </table:table-cell>
          <table:table-cell table:style-name="ce1" office:value-type="string" calcext:value-type="string">
            <text:p>Erro Sistema (Não ouviu ou gerou errado)</text:p>
          </table:table-cell>
          <table:table-cell table:style-name="ce1" office:value-type="string" calcext:value-type="string">
            <text:p>Erro Usuário (Lógica)</text:p>
          </table:table-cell>
          <table:table-cell table:style-name="ce1" office:value-type="string" calcext:value-type="string">
            <text:p>Erro Navegação</text:p>
          </table:table-cell>
          <table:table-cell table:style-name="ce1" office:value-type="string" calcext:value-type="string">
            <text:p>Taxa Falha Sistema (%)</text:p>
          </table:table-cell>
          <table:table-cell table:style-name="ce1" office:value-type="string" calcext:value-type="string">
            <text:p>Taxa Erro Usuário (%)</text:p>
          </table:table-cell>
          <table:table-cell table:style-name="ce5" office:value-type="string" calcext:value-type="string">
            <text:p>Tempo da </text:p>
            <text:p>Tarefa</text:p>
          </table:table-cell>
          <table:table-cell table:style-name="ce5" office:value-type="string" calcext:value-type="string">
            <text:p>Desistiu?</text:p>
          </table:table-cell>
          <table:table-cell table:style-name="ce9" office:value-type="string" calcext:value-type="string">
            <text:p>Quantidade de Vezes</text:p>
            <text:p>Que pediu para </text:p>
            <text:p>Repetir um comando?</text:p>
          </table:table-cell>
          <table:table-cell table:style-name="ce9" office:value-type="string" calcext:value-type="string">
            <text:p>Quantidade</text:p>
            <text:p>De vezes que</text:p>
            <text:p>Pediu ajuda?</text:p>
          </table:table-cell>
          <table:table-cell table:style-name="ce9" office:value-type="string" calcext:value-type="string">
            <text:p>Tipo de ajuda?</text:p>
            <text:p>(escreva e separe </text:p>
            <text:p>Por virgulas)</text:p>
          </table:table-cell>
        </table:table-row>
        <table:table-row table:style-name="ro3">
          <table:table-cell office:value-type="string" calcext:value-type="string">
            <text:p>P0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8 (log)</text:p>
          </table:table-cell>
          <table:table-cell office:value-type="string" calcext:value-type="string">
            <text:p>40 (log) + 11 (voz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92156862745098" calcext:value-type="float">
            <text:p>3,92156862745098</text:p>
          </table:table-cell>
          <table:table-cell office:value-type="float" office:value="21.5686274509804" calcext:value-type="float">
            <text:p>21,5686274509804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ão estava localizando a tecla enter, não sabia como ver o que escrevia no código, auxiliar a usar a ajuda F1, não sabia se o microfone estava habilitado, a participante não sabia o que viria depois de falar “Ajuda 1”, Apresentou dúvidas sobre o conceito de programação “escrever”, Não sabia o próximo passo (executar), Novamente apresentou dúvidas sobre o conceito de programação “escrever”, Não sabia o que era “executar”, </text:p>
          </table:table-cell>
        </table:table-row>
        <table:table-row table:style-name="ro3">
          <table:table-cell office:value-type="string" calcext:value-type="string">
            <text:p>P0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14 (log) + 4 (assist)</text:p>
          </table:table-cell>
          <table:table-cell office:value-type="string" calcext:value-type="string">
            <text:p>55 (log) + 44 (voz)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.1414141414141" calcext:value-type="float">
            <text:p>14,1414141414141</text:p>
          </table:table-cell>
          <table:table-cell office:value-type="float" office:value="17.1717171717172" calcext:value-type="float">
            <text:p>17,1717171717172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o assistente para criar variáveis cria duas ou mais variáveis ou só uma de cada vez, Pediu ajuda para relembrar o fluxo de operação, Não sabia como funcionava o assistente para criação de operações, Não sabia o próximo passo (fluxo) para criar a próxima operação à variável y, </text:p>
          </table:table-cell>
        </table:table-row>
        <table:table-row table:style-name="ro3">
          <table:table-cell office:value-type="string" calcext:value-type="string">
            <text:p>P0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8 (log)</text:p>
          </table:table-cell>
          <table:table-cell office:value-type="string" calcext:value-type="string">
            <text:p>179 (log) + 30 (voz)</text:p>
          </table:table-cell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26315789473684" calcext:value-type="float">
            <text:p>5,26315789473684</text:p>
          </table:table-cell>
          <table:table-cell office:value-type="float" office:value="4.30622009569378" calcext:value-type="float">
            <text:p>4,30622009569378</text:p>
          </table:table-cell>
          <table:table-cell office:value-type="string" calcext:value-type="string">
            <text:p>31 min</text:p>
          </table:table-cell>
          <table:table-cell office:value-type="string" calcext:value-type="string">
            <text:p>Si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a perguntou se após a criação da variável já era pra criar a estrutura condicional (sim), Dúvidas na criação de condicional, Ela perguntou como ir direto ao bloco de condicional, Dúvida se pontuação se coloca com voz também (não)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10 (log)</text:p>
          </table:table-cell>
          <table:table-cell office:value-type="string" calcext:value-type="string">
            <text:p>60 (log) + 7 (voz)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.47761194029851" calcext:value-type="float">
            <text:p>4,47761194029851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a precisou que repetisse os atalhos da tela inicial de boas-vindas; A participante havia esquecido o atalho para imprimir na tela, mas logo foi orientado a usar a tecla F1; Ela confundiu “imprimir na tela” com “executar”, pois a execução fala que ela declarou uma variável e o seu valor; <text:s/>A participante ficou na dúvida se quando o assistente cancelava a operação ela teria que fazer tudo de novo; A participante apresentou dúvidas sobre o conceito de “impressão de valores”, que foi devidamente explicado; Ela ficou na dúvida se a impressão de valores era pra ‘variável’ ou ‘texto livre’; A participante apresentou dúvidas quanto a correção de erros no código, que deve ser feita direto no editor; Apresentou dúvidas quanto ao ajuste fino solicitado pelo interpretador da linguagem Égua; 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9 (log)</text:p>
          </table:table-cell>
          <table:table-cell office:value-type="string" calcext:value-type="string">
            <text:p>139 (log) + 27 (voz)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42168674698795" calcext:value-type="float">
            <text:p>5,42168674698795</text:p>
          </table:table-cell>
          <table:table-cell office:value-type="float" office:value="4.21686746987952" calcext:value-type="float">
            <text:p>4,21686746987952</text:p>
          </table:table-cell>
          <table:table-cell office:value-type="string" calcext:value-type="string">
            <text:p>27 min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participante ficou na dúvida se o assistente para criação de variáveis cria uma variável ou várias variáveis por vez; A usuária queria saber como acessar os atalhos de navegação do código; A participante não sabia como ler a linha no código; A participante esperava que desse para falar o comando após o assistente cancelar a operação; A participante não sabia se ela colocava a expressão 4*5 ou o resultado 20 atribuído na variável; 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2 (log)</text:p>
          </table:table-cell>
          <table:table-cell office:value-type="string" calcext:value-type="string">
            <text:p>104 (log) + 35 (voz)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.19424460431655" calcext:value-type="float">
            <text:p>7,19424460431655</text:p>
          </table:table-cell>
          <table:table-cell office:value-type="float" office:value="20.1438848920863" calcext:value-type="float">
            <text:p>20,1438848920863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Si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usuária ficou na dúvida se o primeiro assistente também cria estruturas condicionais; A participante perguntou se a solução poderiam ter dois “SE’s” (sim, e não havia pensado nessa possibilidade no gabarito); A usuária questionou porque o assistente havia criado errado a numeração 25, colocando no lugar 75 (erro de reconhecimento de fala); 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1 (log)</text:p>
          </table:table-cell>
          <table:table-cell office:value-type="string" calcext:value-type="string">
            <text:p>312 (log) + 20 (voz)</text:p>
          </table:table-cell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1084337349398" calcext:value-type="float">
            <text:p>2,71084337349398</text:p>
          </table:table-cell>
          <table:table-cell office:value-type="float" office:value="2.10843373493976" calcext:value-type="float">
            <text:p>2,10843373493976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 usuário queria saber como desfazia a alteração no editor de código, pois o sistema havia criado a variável de forma errônea; O usuário queria entender porque o sistema estava apenas falando a tecla pressionada, mas sem localização no editor (faltou CTRL+H);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1 (log)</text:p>
          </table:table-cell>
          <table:table-cell office:value-type="string" calcext:value-type="string">
            <text:p>261 (log) + 4(voz)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77358490566038" calcext:value-type="float">
            <text:p>0,377358490566038</text:p>
          </table:table-cell>
          <table:table-cell office:value-type="float" office:value="0.754716981132076" calcext:value-type="float">
            <text:p>0,754716981132076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0 (log)</text:p>
          </table:table-cell>
          <table:table-cell office:value-type="string" calcext:value-type="string">
            <text:p>1238 (log) + 3(voz)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16035455278" calcext:value-type="float">
            <text:p>0,16116035455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6 (log)</text:p>
          </table:table-cell>
          <table:table-cell office:value-type="string" calcext:value-type="string">
            <text:p>31 (log) + 2 (voz)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1212121212121" calcext:value-type="float">
            <text:p>12,1212121212121</text:p>
          </table:table-cell>
          <table:table-cell office:value-type="float" office:value="9.09090909090909" calcext:value-type="float">
            <text:p>9,09090909090909</text:p>
          </table:table-cell>
          <table:table-cell office:value-type="string" calcext:value-type="string">
            <text:p>16 min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 usuário queria que repetisse a listagem inicial, sendo que só pode ir agora a partir das teclas F1 ou CTRL+H; O usuário perguntou qual seria a próxima ação (que no caso, seria o F2) e que deveria ter um tutorial inicial explicando onde acessar os comandos; O usuário queria saber se o sistema aceitava apenas comandos de voz, mas também aceita comandos via teclado; Por conta do reconhecimento incorreto da voz do usuário nas opções do assistente F5, o usuário percebe que talvez isso pode ser um bloqueio do assistente para que não use essa opção, o que não é verdade; 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9 (log)</text:p>
          </table:table-cell>
          <table:table-cell office:value-type="string" calcext:value-type="string">
            <text:p>29 (log) + 15 (voz)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09090909090909" calcext:value-type="float">
            <text:p>9,09090909090909</text:p>
          </table:table-cell>
          <table:table-cell office:value-type="float" office:value="27.2727272727273" calcext:value-type="float">
            <text:p>27,2727272727273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 usuário ficou com dúvidas sobre o que saiu do assistente; O usuário ficou na dúvida se a variável y precisava ter um valor (sim, uma expressão: 4*5); Como corrigir o que foi adicionado errado no código; Novamente, o usuário pergunta se há uma função para corrigir erros no código; O usuário perguntou onde executa o código; 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10 (log)</text:p>
          </table:table-cell>
          <table:table-cell office:value-type="string" calcext:value-type="string">
            <text:p>100 (log) + 22 (voz)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.55737704918033" calcext:value-type="float">
            <text:p>6,55737704918033</text:p>
          </table:table-cell>
          <table:table-cell office:value-type="float" office:value="16.3934426229508" calcext:value-type="float">
            <text:p>16,3934426229508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Nã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 usuário estava na dúvida se o comando para criar estruturas condicionais realmente era o F4; O usuário queria saber a diferença entre a variável simples e a booleana; O usuário estava com dúvida se, após a execução do código, ele teria que continuar ajeitando os erros ou finalizar; Ele questionou se precisava refazer tudo de novo ou por partes; O usuário ficou na dúvida sobre a localização das teclas no editor de código; O usuário ficou na dúvida de como realizar ajustes finos no código (necessário conhecimento de programação); Após cometer um erro de navegação e inserir um caracter no editor de código, o usuário não sabia como corrigir ou remover o caracter do código; O usuário estava com dúvida no comando F10 (limpar toda área de código) se limpava só uma linha ou tudo; O usuário perguntou se tinha como apagar só uma linha; O usuário questinou se, após o console dar uma sugestão de código, se seria possível copiar essa sugestão; O usuário fez o questionamento sobre o “assistente para dar comandos personalizados para inserir código”, 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7 (log)</text:p>
          </table:table-cell>
          <table:table-cell office:value-type="string" calcext:value-type="string">
            <text:p>13 (log) + 8(voz)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2857142857143" calcext:value-type="float">
            <text:p>14,2857142857143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Nã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eria saber como repetir as instruções iniciais (não era possível, logo solicitei o uso de F1 ou CTRL+H); O usuário não sabia dar o próximo passo e pediu ajuda, mas não sabia como pedir ajuda; Novamente, o usuário queria saber como dar o próximo comando (criar variável); O usuário perguntou se era através do microfone que solicitava as operações (sim); O usuário queria saber como voltava para os assistentes; O usuário apresentou confusão na lista de atalhos CTRL+H; Queria saber qual o comando pra imprimir valor na tela e se ele ia precisar fazer tudo do começo; Perguntou se precisaria usar o assistente de voz novamente; O usuário não entendeu quando o assistente cancelou a operação por ele ter falado algo que não era uma das opções e que preciava repetir o comando; O usuário perguntou se a opção realmente era “variável”, pois o assistente não havia entendido; O usuário ficou na dúvida porque que a voz masculina de captura de fala não havia se repetido, por motivos de cancelamento da tarefa; 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2 (log)</text:p>
          </table:table-cell>
          <table:table-cell office:value-type="string" calcext:value-type="string">
            <text:p>12 (log) + 15(voz)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,2222222222222</text:p>
          </table:table-cell>
          <table:table-cell office:value-type="float" office:value="40.7407407407407" calcext:value-type="float">
            <text:p>40,7407407407407</text:p>
          </table:table-cell>
          <table:table-cell office:value-type="string" calcext:value-type="string">
            <text:p>19:30 min</text:p>
          </table:table-cell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icou na dúvida em relação a atribuição de operações para as variáveis y e z; Ficou na dúvida sobre a quantidade de variáveis que podiam ser criadas no comando F2; Pediu para repetir as orientações anteriores, pois havia ficado confuso; Queria saber onde procurava a lista de assistentes (F1); Ficou na dúvida sobre qual seria o próximo passo dentro do fluxo de execuções no programa; Ficou na dúvida se, quando o assistente cancelava, ele tinha que repetir a operação; Ficou na dúvida sobre o sistema de abortar assistente usando o CTRL+ESC; Apresentou dúvidas na manipulação de Operações matemáticas; Não lembrava o comando para voltar a uma operação anterior; Ficou na dúvida porque o sistema gerou o código quando ficou em silêncio; Não sabia que precisava ter abortado o assistente em caso de dúvidas; Queria saber se precisava repetir os comandos; Não entendeu porque que as variáveis y e z são numéricas; Não sabia a diferença entre tipos “numérico” e “texto”; Dúvida no fluxo de operação; Se para o próximo passo precisava dar o mesmo comando do anterior (sim);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2 (log)</text:p>
          </table:table-cell>
          <table:table-cell office:value-type="string" calcext:value-type="string">
            <text:p>15 (log) + 16(voz)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4838709677419" calcext:value-type="float">
            <text:p>35,4838709677419</text:p>
          </table:table-cell>
          <table:table-cell office:value-type="float" office:value="32.258064516129" calcext:value-type="float">
            <text:p>32,258064516129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Sim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úvidas na construção de estrutura condicional (como funciona o SE-ENTÃO-SENÃO); Por causa da criação da estrutura condicional após cancelamento da operação do usuário, ele ficou com dúvidas sobre o que o assistente criou; Ele não tinha certeza se o comando da estrutura condicional era F4; Novamente, o usuário apresentou dúvidas quanto ao seguimento do fluxo de criação após cancelamento da operação no assistente; Novamente, o usuário possuía dúvidas quanto ao prosseguimento no fluxo de execução; Após o usuário apertar um comando de forma equivocada, ele não sabia como voltar; O usuário não sabia o que fazer no bloco SENÃO; Após não realizar a estrutura condicional e ter cometido um erro, o usuário não sabia como voltar; O usuário, novamente, não lembrava do comando de criação de condicionais (F4); Pelo fato do usuário não ter entendido tão bem a estrutura condicional, ele não estava sabendo onde corrigir o código; Por causa do erro do assistente em criar a estrutura condicional SENÃO, o usuário estava se sentindo confuso; 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8 (log)</text:p>
          </table:table-cell>
          <table:table-cell office:value-type="string" calcext:value-type="string">
            <text:p>29 (log) + 6 (voz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1428571428571" calcext:value-type="float">
            <text:p>5,71428571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 usuário perguntou onde alterava a velocidade da voz (alt + setas); O usuário perguntou se a navegação na ajuda funcionava semelhante ao NVDA (por setas); Nas teclas F2, F3 e F4 (assistentes), o usuário perguntou se ia precisar aprender sozinho ou ia ter um tutorial (sozinho); O usuário ficou na dúvida se o assistente iria avisá-lo se o áudio do microfone estava sendo capturado (bip/som: sim!)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 (log)</text:p>
          </table:table-cell>
          <table:table-cell office:value-type="string" calcext:value-type="string">
            <text:p>40 (log) + 16 (voz)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5714285714286" calcext:value-type="float">
            <text:p>5,35714285714286</text:p>
          </table:table-cell>
          <table:table-cell office:value-type="float" office:value="7.14285714285714" calcext:value-type="float">
            <text:p>7,14285714285714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 assistente terminou a captura de fala muito rapidamente e o usuário ficou na dúvida sobre se estava correto o código gerado. Pedi para que ele consultasse o CTRL+H; O usuário ficou na dúvida sobre o funcionamento do assistente F3 (criar operações), como era criado, se permitia operações entre variáveis, e se diferenciava do F2 (criar variável); O usuário ficou confuso com a saída inesperada do modelo de geração; O usuário perguntou sobre o comando para apagar código (F10)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 (log)</text:p>
          </table:table-cell>
          <table:table-cell office:value-type="string" calcext:value-type="string">
            <text:p>552 (log) + 36 (voz)</text:p>
          </table:table-cell>
          <table:table-cell office:value-type="float" office:value="588" calcext:value-type="float">
            <text:p>5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04081632653061" calcext:value-type="float">
            <text:p>2,04081632653061</text:p>
          </table:table-cell>
          <table:table-cell office:value-type="float" office:value="1.02040816326531" calcext:value-type="float">
            <text:p>1,02040816326531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 usuário perguntou sobre como o assistente havia escrito a variável t (te) e se havia algum problema (no futuro, talvez sim); O usuário perguntou como apagava um trecho do código (navegação Shift + setas e Backspace); Como o usuário poderia criar apenas um pedaço da condicional (SENÃO: teria que usar CTRL+K ou F9); O assistente não entendeu o comando do usuário, e o assistente cancelou, porém o usuário ficou confuso quando o assistente finalizou devido ao erro de reconhecimento de voz; O sistema não reconheceu 2 vezes o comando “variável simples” no primeiro assistente.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 table:number-rows-repeated="5">
          <table:table-cell table:style-name="ce14"/>
          <table:table-cell table:number-columns-repeated="14"/>
        </table:table-row>
        <table:table-row table:style-name="ro2">
          <table:table-cell table:style-name="ce1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2:43:11.3548735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8:29:51.760950105</meta:creation-date>
    <dc:date>2026-03-15T12:45:59.030922871</dc:date>
    <meta:editing-duration>P2DT14H58M47S</meta:editing-duration>
    <meta:editing-cycles>22</meta:editing-cycles>
    <meta:generator>LibreOffice/24.2.7.2$Linux_X86_64 LibreOffice_project/420$Build-2</meta:generator>
    <meta:document-statistic meta:table-count="2" meta:cell-count="568" meta:object-count="0"/>
    <meta:user-defined meta:name=""/>
  </office:meta>
</office:document-meta>
</file>